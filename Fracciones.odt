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2" style:family="paragraph" style:parent-style-name="Standard">
      <style:paragraph-properties fo:margin-left="0cm" fo:margin-right="0cm" fo:margin-top="0.318cm" fo:margin-bottom="0.423cm" style:contextual-spacing="false" fo:text-indent="0cm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3" style:family="paragraph" style:parent-style-name="Standard">
      <style:paragraph-properties fo:margin-left="0cm" fo:margin-right="0cm" fo:margin-top="0.635cm" fo:margin-bottom="0.318cm" style:contextual-spacing="false" fo:text-indent="0cm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5" style:family="paragraph" style:parent-style-name="Text_20_body">
      <style:paragraph-properties fo:margin-left="0cm" fo:margin-right="0cm" fo:margin-top="0.635cm" fo:margin-bottom="0.318cm" style:contextual-spacing="false" fo:text-indent="0cm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cm" loext:border="none"/>
    </style:style>
    <style:style style:name="P6" style:family="paragraph" style:parent-style-name="Text_20_body">
      <style:paragraph-properties fo:margin-left="0cm" fo:margin-right="0cm" fo:margin-top="0.318cm" fo:margin-bottom="0.423cm" style:contextual-spacing="false" fo:text-indent="0cm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8" style:family="paragraph" style:parent-style-name="Text_20_body">
      <style:paragraph-properties fo:margin-left="0cm" fo:margin-right="0cm" fo:margin-top="0.635cm" fo:margin-bottom="0.318cm" style:contextual-spacing="false" fo:text-indent="0cm" style:auto-text-indent="false" style:writing-mode="lr-tb"/>
      <style:text-properties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P9" style:family="paragraph" style:parent-style-name="Text_20_body">
      <style:paragraph-properties fo:margin-left="0cm" fo:margin-right="0cm" fo:margin-top="0.318cm" fo:margin-bottom="0.423cm" style:contextual-spacing="false" fo:text-indent="0cm" style:auto-text-indent="false" style:writing-mode="lr-tb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T2" style:family="text"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T3" style:family="text">
      <style:text-properties style:text-line-through-style="none" style:text-line-through-type="none" style:font-name="Google Sans" fo:font-size="12pt" style:text-underline-style="solid" style:text-underline-width="auto" style:text-underline-color="font-color" fo:font-weight="normal" style:text-blinking="false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nseñar la reducción (o simplificación) de fracciones a alumnos de secundaria en México, el secreto está en conectar el concepto abstracto con repartos reales y el dinero, vinculándolo directamente con el plan de estudios de la Nueva Escuela Mexicana (NEM).</text:p>
      <text:p text:style-name="P2">A continuación, se presenta una estrategia didáctica paso a paso, diseñada para mantener el interés y asegurar la comprensión.</text:p>
      <text:p text:style-name="P3">1. El Gancho: Conexión con la Realidad</text:p>
      <text:p text:style-name="P2">Evita iniciar directo con las reglas matemáticas. Usa analogías de su entorno actual.</text:p>
      <text:list text:style-name="L1">
        <text:list-item>
          <text:p text:style-name="P4"><text:span text:style-name="Strong_20_Emphasis"><text:span text:style-name="T1">El ejemplo de la tiendita o el dinero:</text:span></text:span><text:span text:style-name="T2"> Pregúntales qué prefieren: ¿dos monedas de 50 centavos o una moneda de 1 peso? Explícales que valen lo mismo, pero representarlo con una sola moneda es más sencillo. Reducir fracciones es exactamente eso: decir lo mismo con menos números. [</text:span><text:a xlink:type="simple" xlink:href="https://www.superprof.es/apuntes/escolar/matematicas/aritmetica/racionales/ejercicios-de-fracciones-2.html" text:style-name="Internet_20_link" text:visited-style-name="Visited_20_Internet_20_Link"><text:span text:style-name="T3">1</text:span></text:a><text:span text:style-name="T2">]</text:span></text:p>
        </text:list-item>
        <text:list-item>
          <text:p text:style-name="P4"><text:span text:style-name="Strong_20_Emphasis"><text:span text:style-name="T1">La pizza o el pastel:</text:span></text:span><text:span text:style-name="T2"> Grafica en el pizarrón dos círculos idénticos. Divide uno en 4 partes e ilumina 2 (\(\frac{2}{4}\)). Divide el otro en 2 partes e ilumina 1 (\(\frac{1}{2}\)). Visualmente verán que comieron la misma cantidad.</text:span></text:p>
        </text:list-item>
      </text:list>
      <text:p text:style-name="P5">2. El Concepto Clave: Dividir por el "Mismo Número"</text:p>
      <text:p text:style-name="P6">El error más común en secundaria es que los alumnos restan en lugar de dividir, o dividen el numerador entre un número y el denominador entre otro.</text:p>
      <text:list text:style-name="L2">
        <text:list-item>
          <text:p text:style-name="P7"><text:span text:style-name="Strong_20_Emphasis"><text:span text:style-name="T1">La Regla de Oro:</text:span></text:span><text:span text:style-name="T2"> "Lo que le haces al de arriba, se lo tienes que hacer al de abajo".</text:span></text:p>
        </text:list-item>
        <text:list-item>
          <text:p text:style-name="P7"><text:span text:style-name="Strong_20_Emphasis"><text:span text:style-name="T1">El juego de los "Hermanos Gemelos":</text:span></text:span><text:span text:style-name="T2"> El numerador y el denominador son hermanos que deben recibir exactamente el mismo trato para no pelear. Si divides al de arriba entre 2, el de abajo obligatoriamente se divide entre 2.</text:span></text:p>
        </text:list-item>
      </text:list>
      <text:p text:style-name="P5">3. Dos Métodos de Resolución (De Menor a Mayor Dificultad)</text:p>
      <text:p text:style-name="P6">Presenta los dos caminos para que ellos elijan el que les dé más confianza:</text:p>
      <text:p text:style-name="P8">Método A: El camino de las mitades (Divisiones sucesivas)</text:p>
      <text:p text:style-name="P9"><text:span text:style-name="T2">Ideal para alumnos que aún no dominan por completo las tablas de multiplicar. Consiste en usar los números primos en orden: 2, 3, 5, 7. [</text:span><text:a xlink:type="simple" xlink:href="https://educacion.sanjuan.edu.ar/mesj/LinkClick.aspx?fileticket=yPHmFmGO8Y8%3D&amp;tabid=679&amp;mid=1746" text:style-name="Internet_20_link" text:visited-style-name="Visited_20_Internet_20_Link"><text:span text:style-name="T3">1</text:span></text:a><text:span text:style-name="T2">, </text:span><text:a xlink:type="simple" xlink:href="https://www.webcolegios.com/file/5b5076.pdf" text:style-name="Internet_20_link" text:visited-style-name="Visited_20_Internet_20_Link"><text:span text:style-name="T3">2</text:span></text:a><text:span text:style-name="T2">]</text:span></text:p>
      <text:list text:style-name="L3">
        <text:list-item>
          <text:p text:style-name="P10"><text:span text:style-name="Strong_20_Emphasis"><text:span text:style-name="T1">Ejemplo con \(\frac{12}{18}\):</text:span></text:span></text:p>
          <text:list>
            <text:list-item>
              <text:p text:style-name="P11">¿Tienen mitad? Sí. 12 ÷ 2 = 6 y 18 ÷ 2 = 9. Nos queda \(\frac{6}{9}\).</text:p>
            </text:list-item>
            <text:list-item>
              <text:p text:style-name="P11">¿Tienen mitad? El 6 sí, pero el 9 no. Pasamos al siguiente número: el 3.</text:p>
            </text:list-item>
            <text:list-item>
              <text:p text:style-name="P11"><text:soft-page-break/>¿Se pueden dividir entre 3? Sí. 6 ÷ 3 = 2 y 9 ÷ 3 = 3. Nos queda \(\frac{2}{3}\).</text:p>
            </text:list-item>
            <text:list-item>
              <text:p text:style-name="P10"><text:span text:style-name="T2">Como ya no se pueden dividir entre el mismo número, terminamos. [</text:span><text:a xlink:type="simple" xlink:href="https://www.tiktok.com/@mateevelyn/video/7297641351770950918" text:style-name="Internet_20_link" text:visited-style-name="Visited_20_Internet_20_Link"><text:span text:style-name="T3">1</text:span></text:a><text:span text:style-name="T2">, </text:span><text:a xlink:type="simple" xlink:href="https://www.tiktok.com/@mateevelyn/video/7297641351770950918" text:style-name="Internet_20_link" text:visited-style-name="Visited_20_Internet_20_Link"><text:span text:style-name="T3">2</text:span></text:a><text:span text:style-name="T2">, </text:span><text:a xlink:type="simple" xlink:href="https://psicotecnicos2x.es/blog/operaciones-con-fracciones-psicotecnicos-numericos/" text:style-name="Internet_20_link" text:visited-style-name="Visited_20_Internet_20_Link"><text:span text:style-name="T3">3</text:span></text:a><text:span text:style-name="T2">]</text:span></text:p>
            </text:list-item>
          </text:list>
        </text:list-item>
      </text:list>
      <text:p text:style-name="P8">Método B: El camino rápido (Máximo Común Divisor - MCD)</text:p>
      <text:p text:style-name="P6">Ideal para los alumnos más avanzados o para cuando ya dominan el método anterior.</text:p>
      <text:list text:style-name="L4">
        <text:list-item>
          <text:p text:style-name="P12"><text:span text:style-name="Strong_20_Emphasis"><text:span text:style-name="T1">Ejemplo con \(\frac{12}{18}\):</text:span></text:span></text:p>
          <text:list>
            <text:list-item>
              <text:p text:style-name="P13">Buscamos el número más grande que divida a ambos (MCD), que es el 6.</text:p>
            </text:list-item>
            <text:list-item>
              <text:p text:style-name="P12"><text:span text:style-name="T2">Dividimos directamente: 12 ÷ 6 = 2 y 18 ÷ 6 = 3. Llegamos a \(\frac{2}{3}\) en un solo paso. [</text:span><text:a xlink:type="simple" xlink:href="http://content.njctl.org/courses/common-core-math-espanol/cursos-archivados/pre-algebra-en-espanol/fracciones/presentacion-de-las-fracciones-numericas-parte-1/presentacion-de-las-fracciones-numericas-parte-1-2011-12-05-3-slides-per-page.pdf" text:style-name="Internet_20_link" text:visited-style-name="Visited_20_Internet_20_Link"><text:span text:style-name="T3">1</text:span></text:a><text:span text:style-name="T2">, </text:span><text:a xlink:type="simple" xlink:href="https://www.tutorela.es/matematicas/como-se-reducen-las-fracciones/ejemplos-ejercicios" text:style-name="Internet_20_link" text:visited-style-name="Visited_20_Internet_20_Link"><text:span text:style-name="T3">2</text:span></text:a><text:span text:style-name="T2">, </text:span><text:a xlink:type="simple" xlink:href="https://es.scribd.com/doc/161290144/Itzcovich-El-Trabajo-Escolar-Entorno-a-Las-Fracciones" text:style-name="Internet_20_link" text:visited-style-name="Visited_20_Internet_20_Link"><text:span text:style-name="T3">3</text:span></text:a><text:span text:style-name="T2">, </text:span><text:a xlink:type="simple" xlink:href="https://baike.baidu.com/es/item/Fracción/1351695" text:style-name="Internet_20_link" text:visited-style-name="Visited_20_Internet_20_Link"><text:span text:style-name="T3">4</text:span></text:a><text:span text:style-name="T2">]</text:span></text:p>
            </text:list-item>
          </text:list>
        </text:list-item>
      </text:list>
      <text:p text:style-name="P5">4. Actividad Práctica y Gamificación</text:p>
      <text:p text:style-name="P6">En lugar de una hoja con 50 ejercicios aburridos, utiliza dinámicas interactivas:</text:p>
      <text:list text:style-name="L5">
        <text:list-item>
          <text:p text:style-name="P14"><text:span text:style-name="Strong_20_Emphasis"><text:span text:style-name="T1">Memorama de Fracciones Equivalentes:</text:span></text:span><text:span text:style-name="T2"> Crea tarjetas donde una sea \(\frac{4}{8}\) y su par sea \(\frac{1}{2}\). Los alumnos deben encontrar las parejas reduciendo las fracciones grandes.</text:span></text:p>
        </text:list-item>
        <text:list-item>
          <text:p text:style-name="P14"><text:span text:style-name="Strong_20_Emphasis"><text:span text:style-name="T1">El "Fraccionómetro" en el pizarrón:</text:span></text:span><text:span text:style-name="T2"> Pasa a dos alumnos al pizarrón, dales la misma fracción grande (por ejemplo, \(\frac{40}{60}\)) y haz una carrera de velocidad para ver quién llega primero a la fracción irreducible (\(\frac{2}{3}\)).</text:span></text:p>
        </text:list-item>
      </text:list>
      <text:p text:style-name="P5">5. Errores Comunes que Debes Anticipar</text:p>
      <text:list text:style-name="L6">
        <text:list-item>
          <text:p text:style-name="P15"><text:span text:style-name="Strong_20_Emphasis"><text:span text:style-name="T1">Confundir reducción con división decimal:</text:span></text:span><text:span text:style-name="T2"> Explícales que el objetivo es obtener otra fracción con números más chicos, no resolver la división para obtener un punto decimal (por ejemplo, transformar \(\frac{1}{2}\) en 0.5 no es reducir).</text:span></text:p>
        </text:list-item>
        <text:list-item>
          <text:p text:style-name="P15"><text:span text:style-name="Strong_20_Emphasis"><text:span text:style-name="T1">Olvidar cuándo parar:</text:span></text:span><text:span text:style-name="T2"> Enséñales a reconocer una </text:span><text:span text:style-name="Strong_20_Emphasis"><text:span text:style-name="T1">fracción irreducible</text:span></text:span><text:span text:style-name="T2">. Si el numerador es 1, o si ambos números son primos consecutivos (como \(\frac{2}{3}\) o \(\frac{4}{5}\)), el trabajo ha terminado.</text:span></text:p>
        </text:list-item>
      </text:list>
      <text:p text:style-name="P6">Si te interesa, puedo ayudarte a diseñar:</text:p>
      <text:list text:style-name="L7">
        <text:list-item>
          <text:p text:style-name="P16"><text:span text:style-name="T2">Un </text:span><text:span text:style-name="Strong_20_Emphasis"><text:span text:style-name="T1">banco de ejercicios</text:span></text:span><text:span text:style-name="T2"> clasificados de fácil a difícil.</text:span></text:p>
        </text:list-item>
        <text:list-item>
          <text:p text:style-name="P16"><text:span text:style-name="T2">Una </text:span><text:span text:style-name="Strong_20_Emphasis"><text:span text:style-name="T1">planeación didáctica formal</text:span></text:span><text:span text:style-name="T2"> bajo el formato de la NEM (proyectos o campos formativos).</text:span></text:p>
        </text:list-item>
        <text:list-item>
          <text:p text:style-name="P16"><text:span text:style-name="T2">Una </text:span><text:span text:style-name="Strong_20_Emphasis"><text:span text:style-name="T1">mini-evaluación</text:span></text:span><text:span text:style-name="T2"> de diagnóstico para tus alumnos.</text:span></text:p>
        </text:list-item>
      </text:list>
      <text:p text:style-name="P17"><text:span text:style-name="T2">¿Cómo te gustaría </text:span><text:span text:style-name="Strong_20_Emphasis"><text:span text:style-name="T1">continuar con la planeación</text:span></text:span><text:span text:style-name="T2"> de tu clase?</text:span></text:p>
      <text:p text:style-name="P18"><text:bookmark text:name="iteE-asKFN6HVkPIPsPH6oAY_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6T14:59:13.243643800</meta:creation-date>
    <meta:print-date>2026-06-26T14:59:51.754859400</meta:print-date>
    <dc:date>2026-06-26T15:00:19.871067200</dc:date>
    <meta:editing-duration>PT1M8S</meta:editing-duration>
    <meta:editing-cycles>1</meta:editing-cycles>
    <meta:document-statistic meta:table-count="0" meta:image-count="0" meta:object-count="0" meta:page-count="2" meta:paragraph-count="36" meta:word-count="666" meta:character-count="3849" meta:non-whitespace-character-count="3238"/>
    <meta:generator>LibreOffice/26.2.1.2$Windows_X86_64 LibreOffice_project/620$Build-2</meta:generator>
  </office:meta>
</office:document-meta>
</file>